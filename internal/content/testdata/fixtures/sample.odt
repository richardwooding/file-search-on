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ample Office Fixture</text:p>
      <text:p text:style-name="Author">file-search-on test fixtures</text:p>
      <text:h text:style-name="Heading_20_1" text:outline-level="1"><text:bookmark-start text:name="sample-office-fixture"/>Sample Office Fixture<text:bookmark-end text:name="sample-office-fixture"/></text:h>
      <text:p text:style-name="First_20_paragraph">Generated for the content-type test suit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en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en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>Sample Office Fixture</dc:title>
    <dc:description/>
    <dc:subject/>
    <meta:keyword/>
    <dc:language>en</dc:language>
    <meta:initial-creator>file-search-on test fixtures</meta:initial-creator>
    <dc:creator>file-search-on test fixtures</dc:creator>
    <meta:creation-date>2026-05-05T09:14:14Z</meta:creation-date>
    <dc:date>2026-05-05T09:14:14Z</dc:date>
  </office:meta>
</office:document-meta>
</file>